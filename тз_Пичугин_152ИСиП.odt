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YS Geo" svg:font-family="'YS Geo', apple-system, BlinkMacSystemFont, Arial, Helvetica, 'Arial Unicode MS'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4pt" officeooo:paragraph-rsid="000bd4b2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officeooo:paragraph-rsid="000c1fb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alibri" fo:font-style="italic" fo:font-weight="bold" officeooo:paragraph-rsid="000c1fb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font-style="italic" fo:font-weight="bold" officeooo:rsid="000c1fb3" officeooo:paragraph-rsid="000c1fb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f1115" loext:opacity="100%" style:font-name="Calibri" fo:font-size="14pt" fo:letter-spacing="normal" fo:font-style="normal" fo:font-weight="normal" officeooo:paragraph-rsid="000bd4b2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fo:font-weight="bold" officeooo:rsid="001440d8" officeooo:paragraph-rsid="000bd4b2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officeooo:paragraph-rsid="000bd4b2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Calibri" fo:font-size="14pt" officeooo:paragraph-rsid="000bd4b2" style:font-size-asian="14pt" style:font-size-complex="14pt"/>
    </style:style>
    <style:style style:name="P10" style:family="paragraph" style:parent-style-name="Text_20_body" style:master-page-name="">
      <loext:graphic-properties draw:fill="none"/>
      <style:paragraph-properties fo:margin-left="-0.199cm" fo:margin-right="0cm" fo:margin-top="0cm" fo:margin-bottom="0cm" style:contextual-spacing="false" fo:line-height="115%" fo:orphans="2" fo:widows="2" fo:text-indent="0cm" style:auto-text-indent="false" style:page-number="auto" fo:background-color="transparent" fo:padding="0cm" fo:border="none"/>
      <style:text-properties style:font-name="Calibri" fo:font-size="14pt" fo:font-weight="bold" officeooo:rsid="001440d8" officeooo:paragraph-rsid="000bd4b2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Calibri" fo:font-size="14pt" fo:font-weight="bold" officeooo:rsid="001440d8" officeooo:paragraph-rsid="000bd4b2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bold" officeooo:rsid="001440d8" officeooo:paragraph-rsid="000bd4b2" style:font-weight-asian="bold" style:font-weight-complex="bold"/>
    </style:style>
    <style:style style:name="P13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Calibri" fo:font-size="14pt" fo:letter-spacing="normal" fo:font-style="normal" fo:font-weight="normal" style:font-size-asian="14pt" style:font-size-complex="14pt"/>
    </style:style>
    <style:style style:name="P14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Calibri" fo:font-size="14pt" fo:letter-spacing="normal" fo:font-style="normal" fo:font-weight="normal" style:font-size-asian="14pt" style:font-size-complex="14pt"/>
    </style:style>
    <style:style style:name="P15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Calibri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</style:style>
    <style:style style:name="P17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Calibri" fo:font-size="14pt" fo:letter-spacing="normal" fo:font-style="normal" fo:font-weight="normal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Calibri" fo:font-size="14pt" fo:letter-spacing="normal" fo:font-style="normal" fo:font-weight="bold" officeooo:rsid="00165dbd" officeooo:paragraph-rsid="000bd4b2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Calibri" fo:font-size="14pt" fo:letter-spacing="normal" fo:font-style="normal" fo:font-weight="normal" officeooo:rsid="00165dbd" officeooo:paragraph-rsid="000bd4b2" style:font-size-asian="14pt" style:font-weight-asian="normal" style:font-size-complex="14pt" style:font-weight-complex="normal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Calibri" fo:font-size="14pt" fo:letter-spacing="normal" fo:font-style="normal" fo:font-weight="normal" officeooo:paragraph-rsid="000bd4b2" style:font-size-asian="14pt" style:font-size-complex="14pt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Calibri" fo:font-size="14pt" fo:letter-spacing="normal" fo:font-style="normal" fo:font-weight="normal" officeooo:rsid="00165dbd" officeooo:paragraph-rsid="000bd4b2" style:font-size-asian="14pt" style:font-weight-asian="normal" style:font-size-complex="14pt" style:font-weight-complex="normal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bd4b2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bd4b2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bd4b2"/>
    </style:style>
    <style:style style:name="P25" style:family="paragraph" style:parent-style-name="Text_20_body">
      <style:text-properties officeooo:paragraph-rsid="000bd4b2"/>
    </style:style>
    <style:style style:name="P26" style:family="paragraph" style:parent-style-name="Text_20_body" style:list-style-name="L9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f1115" loext:opacity="100%" fo:letter-spacing="normal" fo:font-style="normal" fo:font-weight="bold" officeooo:rsid="001440d8" style:font-weight-asian="bold" style:font-weight-complex="bold"/>
    </style:style>
    <style:style style:name="T2" style:family="text">
      <style:text-properties fo:font-variant="normal" fo:text-transform="none" fo:color="#0f1115" loext:opacity="100%" fo:letter-spacing="normal" fo:font-style="normal" fo:font-weight="bold" officeooo:rsid="000c1fb3" style:font-weight-asian="bold" style:font-weight-complex="bold"/>
    </style:style>
    <style:style style:name="T3" style:family="text">
      <style:text-properties fo:font-variant="normal" fo:text-transform="none" fo:color="#0f1115" loext:opacity="100%" fo:font-size="14pt" fo:letter-spacing="normal" officeooo:rsid="000c1fb3" style:font-size-asian="14pt" style:font-size-complex="14pt"/>
    </style:style>
    <style:style style:name="T4" style:family="text">
      <style:text-properties fo:font-variant="normal" fo:text-transform="none" fo:color="#0f1115" loext:opacity="100%" style:font-name="YS Geo" fo:letter-spacing="normal"/>
    </style:style>
    <style:style style:name="T5" style:family="text">
      <style:text-properties fo:font-variant="normal" fo:text-transform="none" fo:color="#0f1115" loext:opacity="100%" fo:letter-spacing="normal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/>
    </style:style>
    <style:style style:name="T8" style:family="text">
      <style:text-properties fo:font-variant="normal" fo:text-transform="none" fo:color="#0f1115" loext:opacity="100%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Calibri" fo:font-size="14pt" fo:letter-spacing="normal" fo:font-style="normal" fo:font-weight="bold" style:font-size-asian="14pt" style:font-size-complex="14pt"/>
    </style:style>
    <style:style style:name="T10" style:family="text">
      <style:text-properties fo:font-variant="normal" fo:text-transform="none" fo:color="#000000" loext:opacity="100%" style:font-name="Calibri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f1115" loext:opacity="100%" fo:letter-spacing="normal" fo:font-style="normal"/>
    </style:style>
    <style:style style:name="T12" style:family="text">
      <style:text-properties fo:font-variant="normal" fo:text-transform="none" fo:color="#0f1115" loext:opacity="100%" fo:letter-spacing="normal" fo:font-style="normal" officeooo:rsid="00153336"/>
    </style:style>
    <style:style style:name="T13" style:family="text">
      <style:text-properties fo:font-variant="normal" fo:text-transform="none" fo:color="#000000" loext:opacity="100%" style:font-name="Calibri" fo:font-size="14pt" fo:letter-spacing="normal" fo:font-style="normal" fo:font-weight="bold" officeooo:rsid="00153336" style:font-size-asian="14pt" style:font-size-complex="14pt"/>
    </style:style>
    <style:style style:name="T14" style:family="text">
      <style:text-properties fo:font-variant="normal" fo:text-transform="none" fo:color="#0f1115" loext:opacity="100%" style:font-name="Calibri" fo:font-size="14pt" fo:letter-spacing="normal" fo:font-style="normal" fo:font-weight="bold" officeooo:rsid="00153336" style:font-size-asian="14pt" style:font-size-complex="14pt"/>
    </style:style>
    <style:style style:name="T15" style:family="text">
      <style:text-properties fo:font-weight="bold"/>
    </style:style>
    <style:style style:name="T16" style:family="text">
      <style:text-properties style:font-name="Calibri" fo:font-size="14pt" fo:font-weight="bold" style:font-size-asian="14pt" style:font-size-complex="14pt"/>
    </style:style>
    <style:style style:name="T17" style:family="text">
      <style:text-properties fo:font-variant="normal" fo:text-transform="none" fo:color="#0f1115" loext:opacity="100%" style:font-name="Calibri" fo:font-size="14pt" fo:letter-spacing="normal" fo:font-style="normal" fo:font-weight="bold" style:font-size-asian="14pt" style:font-size-complex="14pt"/>
    </style:style>
    <style:style style:name="T18" style:family="text">
      <style:text-properties fo:font-variant="normal" fo:text-transform="none" fo:color="#0f1115" loext:opacity="100%" style:font-name="Calibri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0f1115" loext:opacity="100%" style:font-name="Calibri" fo:font-size="14pt" fo:letter-spacing="normal" fo:font-style="normal" fo:font-weight="normal" officeooo:rsid="00165dbd" style:font-size-asian="14pt" style:font-size-complex="14pt"/>
    </style:style>
    <style:style style:name="T20" style:family="text">
      <style:text-properties fo:font-variant="normal" fo:text-transform="none" fo:color="#0f1115" loext:opacity="100%" style:font-name="Calibri" fo:font-size="14pt" fo:letter-spacing="normal" fo:font-style="normal" fo:font-weight="normal" style:font-size-asian="14pt" style:font-size-complex="14p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2"><text:span text:style-name="T2"/></text:p>
      <text:p text:style-name="P3"><text:span text:style-name="T3">Сайт-справочник </text:span><text:span text:style-name="T4">«Крупнейшие реки России»</text:span></text:p>
      <text:p text:style-name="P4"><text:span text:style-name="T5"/></text:p>
      <text:p text:style-name="P2"><text:span text:style-name="T2"/></text:p>
      <text:p text:style-name="P2"><text:span text:style-name="T2"/></text:p>
      <text:p text:style-name="P2"><text:span text:style-name="T1">1. Цель проекта </text:span><text:span text:style-name="T6">Создать</text:span><text:span text:style-name="T7"> </text:span><text:span text:style-name="T6">информационно‑образовательный</text:span><text:span text:style-name="T7"> </text:span><text:span text:style-name="T6">сайт</text:span><text:span text:style-name="T7"> </text:span><text:span text:style-name="T6">о</text:span><text:span text:style-name="T7"> </text:span><text:span text:style-name="T6">крупнейших</text:span><text:span text:style-name="T7"> </text:span><text:span text:style-name="T6">реках</text:span><text:span text:style-name="T7"> </text:span><text:span text:style-name="T6">России,</text:span><text:span text:style-name="T7"> </text:span><text:span text:style-name="T6">который</text:span><text:span text:style-name="T7"> </text:span><text:span text:style-name="T6">предоставит</text:span><text:span text:style-name="T7"> </text:span><text:span text:style-name="T6">пользователям</text:span><text:span text:style-name="T7"> </text:span><text:span text:style-name="T6">систематизированные</text:span><text:span text:style-name="T7"> </text:span><text:span text:style-name="T6">данные</text:span><text:span text:style-name="T7"> </text:span><text:span text:style-name="T6">и</text:span><text:span text:style-name="T7"> </text:span><text:span text:style-name="T6">наглядные</text:span><text:span text:style-name="T7"> </text:span><text:span text:style-name="T6">материалы</text:span><text:span text:style-name="T7"> </text:span><text:span text:style-name="T6">для</text:span><text:span text:style-name="T7"> </text:span><text:span text:style-name="T6">повышения</text:span><text:span text:style-name="T7"> </text:span><text:span text:style-name="T6">географических</text:span><text:span text:style-name="T7"> </text:span><text:span text:style-name="T6">знаний</text:span><text:span text:style-name="T7"> </text:span><text:span text:style-name="T6">и</text:span><text:span text:style-name="T7"> </text:span><text:span text:style-name="T6">экологической</text:span><text:span text:style-name="T7"> </text:span><text:span text:style-name="T6">культуры.</text:span></text:p>
      <text:p text:style-name="P5"/>
      <text:p text:style-name="P1"/>
      <text:p text:style-name="P1"/>
      <text:p text:style-name="P6">2. Целевая аудитория</text:p>
      <text:p text:style-name="P1"><text:span text:style-name="T8"/></text:p>
      <text:p text:style-name="P7"><text:span text:style-name="Strong_20_Emphasis"><text:span text:style-name="T9">Возраст:</text:span></text:span><text:span text:style-name="T10"> 7+ лет (школьники, студенты, взрослые, пенсионеры).</text:span></text:p>
      <text:p text:style-name="P8"><text:span text:style-name="Strong_20_Emphasis"><text:span text:style-name="T9">Интересы:</text:span></text:span><text:span text:style-name="T10"> география, экология, туризм, краеведение, биология, речные круизы и сплавы, охрана природы.</text:span></text:p>
      <text:p text:style-name="P8"><text:span text:style-name="Strong_20_Emphasis"><text:span text:style-name="T9">Уровень знаний:</text:span></text:span><text:span text:style-name="T10"> от начального (базовая информация для детей и неспециалистов) до продвинутого (детализированные данные для студентов, преподавателей, экологов, гидрологов).</text:span></text:p>
      <text:p text:style-name="P8"><text:span text:style-name="Strong_20_Emphasis"><text:span text:style-name="T9">Геолокация:</text:span></text:span><text:span text:style-name="T10"> преимущественно Россия (включая регионы вдоль крупных рек), страны СНГ и международная аудитория (туристы, учёные, изучающие Россию).</text:span></text:p>
      <text:p text:style-name="P1"><text:span text:style-name="T8"/></text:p>
      <text:p text:style-name="P9"><text:span text:style-name="T8"/></text:p>
      <text:p text:style-name="P10"><text:span text:style-name="T11">3. </text:span><text:span text:style-name="T12">Основные разделы сайта</text:span></text:p>
      <text:p text:style-name="P11"><text:span text:style-name="T12"/></text:p>
      <text:p text:style-name="P12"><text:span text:style-name="Strong_20_Emphasis"><text:span text:style-name="T13">1. Главная страница</text:span></text:span></text:p>
      <text:list text:style-name="L1">
        <text:list-item>
          <text:p text:style-name="P13">приветственный блок с кратким описанием проекта;</text:p>
        </text:list-item>
        <text:list-item>
          <text:p text:style-name="P13">интерактивная карта России с отмеченными крупнейшими реками (при наведении — всплывающая подсказка с названием);</text:p>
        </text:list-item>
        <text:list-item>
          <text:p text:style-name="P13">блок «Река дня» с краткой справкой и фото;</text:p>
        </text:list-item>
        <text:list-item>
          <text:p text:style-name="P13">анонсы новостей и экологических акций;</text:p>
        </text:list-item>
        <text:list-item>
          <text:p text:style-name="P13">быстрый переход к каталогу рек.</text:p>
        </text:list-item>
      </text:list>
      <text:p text:style-name="P8"><text:span text:style-name="Strong_20_Emphasis"><text:span text:style-name="T9">2. Каталог рек (основная страница)</text:span></text:span></text:p>
      <text:list text:style-name="L2">
        <text:list-item>
          <text:p text:style-name="P14"><text:soft-page-break/>список крупнейших рек России (Волга, Обь, Енисей, Лена, Амур, Кама, Дон, Печора и др.);</text:p>
        </text:list-item>
        <text:list-item>
          <text:p text:style-name="P14">фильтры для сортировки: по длине, площади бассейна, региону протекания, бассейну океана;</text:p>
        </text:list-item>
        <text:list-item>
          <text:p text:style-name="P14">краткие карточки рек: название, длина, площадь бассейна, фото, ссылка на подробную страницу.</text:p>
        </text:list-item>
      </text:list>
      <text:p text:style-name="P8"><text:span text:style-name="Strong_20_Emphasis"><text:span text:style-name="T9">3. Страница отдельной реки</text:span></text:span><text:span text:style-name="T10"><text:line-break/>Для каждой реки — структурированная информация:</text:span></text:p>
      <text:list text:style-name="L3">
        <text:list-item>
          <text:p text:style-name="P15">географические данные (исток, устье, протяжённость, бассейн);</text:p>
        </text:list-item>
        <text:list-item>
          <text:p text:style-name="P15">гидрологические характеристики (расход воды, режим, питание);</text:p>
        </text:list-item>
        <text:list-item>
          <text:p text:style-name="P15">карта течения с отметками городов, ГЭС, заповедников;</text:p>
        </text:list-item>
        <text:list-item>
          <text:p text:style-name="P15">флора и фауна (виды растений и животных);</text:p>
        </text:list-item>
        <text:list-item>
          <text:p text:style-name="P15">хозяйственное значение (судоходство, энергетика, рыболовство и т. д.);</text:p>
        </text:list-item>
        <text:list-item>
          <text:p text:style-name="P15">культурное и историческое значение;</text:p>
        </text:list-item>
        <text:list-item>
          <text:p text:style-name="P15">экологические проблемы и меры охраны;</text:p>
        </text:list-item>
        <text:list-item>
          <text:p text:style-name="P15">фотогалерея и видеоматериалы;</text:p>
        </text:list-item>
        <text:list-item>
          <text:p text:style-name="P15">интересные факты и легенды.</text:p>
        </text:list-item>
      </text:list>
      <text:p text:style-name="P8"><text:span text:style-name="Strong_20_Emphasis"><text:span text:style-name="T9">4. Полезные материалы</text:span></text:span></text:p>
      <text:list text:style-name="L4">
        <text:list-item>
          <text:p text:style-name="P16"><text:span text:style-name="Strong_20_Emphasis"><text:span text:style-name="T9">FAQ:</text:span></text:span><text:span text:style-name="T10"> ответы на частые вопросы (как определить длину реки, почему реки мелеют, как помочь охране рек и т. д.);</text:span></text:p>
        </text:list-item>
        <text:list-item>
          <text:p text:style-name="P16"><text:span text:style-name="Strong_20_Emphasis"><text:span text:style-name="T9">инфографика:</text:span></text:span><text:span text:style-name="T10"> наглядные сравнения рек (длина, расход воды, площадь бассейна), схемы гидрологического режима, экосистем;</text:span></text:p>
        </text:list-item>
        <text:list-item>
          <text:p text:style-name="P16"><text:span text:style-name="Strong_20_Emphasis"><text:span text:style-name="T9">советы:</text:span></text:span><text:span text:style-name="T10"> рекомендации для туристов (сплавы, круизы, места для отдыха), эковолонтёров (акции по очистке берегов), школьников и учителей (темы проектов, идеи уроков).</text:span></text:p>
        </text:list-item>
      </text:list>
      <text:p text:style-name="P8"><text:span text:style-name="Strong_20_Emphasis"><text:span text:style-name="T9">5. Об о сайте / Контакты</text:span></text:span></text:p>
      <text:list text:style-name="L5">
        <text:list-item>
          <text:p text:style-name="P17">краткая информация о проекте и его целях;</text:p>
        </text:list-item>
        <text:list-item>
          <text:p text:style-name="P17">сведения о команде создателей (эксперты, экологи, географы);</text:p>
        </text:list-item>
        <text:list-item>
          <text:p text:style-name="P17">форма обратной связи (с возможностью отправки сообщений);</text:p>
        </text:list-item>
        <text:list-item>
          <text:p text:style-name="P17"><text:soft-page-break/>email для связи;</text:p>
        </text:list-item>
        <text:list-item>
          <text:p text:style-name="P17">ссылки на соцсети проекта и партнёрские ресурсы (РГО, экологические организации).</text:p>
        </text:list-item>
      </text:list>
      <text:p text:style-name="P12"><text:span text:style-name="Strong_20_Emphasis"><text:span text:style-name="T14"/></text:span></text:p>
      <text:p text:style-name="P18">5. Функциональные требования</text:p>
      <text:p text:style-name="P19"/>
      <text:list text:style-name="L6">
        <text:list-item>
          <text:p text:style-name="P20"><text:s/>Наличие навигационного меню (шапки сайта) для перехода между основными разделами.</text:p>
        </text:list-item>
        <text:list-item>
          <text:p text:style-name="P20"><text:s/>Внутренние ссылки между страницами (например, из каталога на страницу жанра и обратно).</text:p>
        </text:list-item>
        <text:list-item>
          <text:p text:style-name="P20"><text:s/>Адаптивное меню-"бургер" для мобильных устройств.</text:p>
        </text:list-item>
        <text:list-item>
          <text:p text:style-name="P20"><text:s/>Кнопка "Вернуться к началу" на длинных страницах (опционально, на JS).</text:p>
        </text:list-item>
        <text:list-item>
          <text:p text:style-name="P21"><text:s/>Отображение текстовой информации, изображений и иконок.</text:p>
        </text:list-item>
      </text:list>
      <text:p text:style-name="P19"/>
      <text:p text:style-name="P19"><text:span text:style-name="Strong_20_Emphasis"><text:span text:style-name="T15">6. Нефункциональные требования</text:span></text:span></text:p>
      <text:p text:style-name="P19"><text:span text:style-name="Strong_20_Emphasis"><text:span text:style-name="T16"/></text:span></text:p>
      <text:list text:style-name="L7">
        <text:list-item>
          <text:p text:style-name="P22"><text:span text:style-name="Strong_20_Emphasis"><text:span text:style-name="T17"><text:s/>Производительность:</text:span></text:span><text:span text:style-name="T18"> Сайт должен загружаться быстро (&lt;1,</text:span><text:span text:style-name="T19">5</text:span><text:span text:style-name="T18"> сек.) за счет локального размещения файлов и оптимизированных изображений.</text:span></text:p>
        </text:list-item>
        <text:list-item>
          <text:p text:style-name="P22"><text:span text:style-name="Strong_20_Emphasis"><text:span text:style-name="T17"><text:s/>Удобство использования (юзабилити):</text:span></text:span><text:span text:style-name="T18"> Чистый, не перегруженный интерфейс. Логичная навигация. Понятные визуальные элементы (кнопки выглядят как кнопки).</text:span></text:p>
        </text:list-item>
        <text:list-item>
          <text:p text:style-name="P22"><text:span text:style-name="Strong_20_Emphasis"><text:span text:style-name="T17"><text:s/>Адаптивность:</text:span></text:span><text:span text:style-name="T18"> Корректное отображение на всех типах устройств (от смартфонов 320px до десктопов 1920px+) с использованием медиазапросов.</text:span></text:p>
        </text:list-item>
        <text:list-item>
          <text:p text:style-name="P22"><text:span text:style-name="Strong_20_Emphasis"><text:span text:style-name="T17"><text:s/>Доступность:</text:span></text:span><text:span text:style-name="T18"> Хорошая контрастность текста, размер шрифта не менее 16px для основного текста на мобильных. Наличие атрибутов </text:span><text:span text:style-name="Source_20_Text"><text:span text:style-name="T20">alt</text:span></text:span><text:span text:style-name="T18"> у всех изображений.</text:span></text:p>
        </text:list-item>
        <text:list-item>
          <text:p text:style-name="P22"><text:span text:style-name="Strong_20_Emphasis"><text:span text:style-name="T17"><text:s/>Поддержка браузеров:</text:span></text:span><text:span text:style-name="T18"> Корректная работа в последних версиях Chrome, Firefox, Edge.</text:span></text:p>
        </text:list-item>
        <text:list-item>
          <text:p text:style-name="P22"><text:span text:style-name="Strong_20_Emphasis"><text:span text:style-name="T17"><text:s/>Безопасность:</text:span></text:span><text:span text:style-name="T18"> Статический сайт не обрабатывает пользовательские данные, что минимизирует риски.</text:span></text:p>
        </text:list-item>
        <text:list-item>
          <text:p text:style-name="P22"><text:span text:style-name="Strong_20_Emphasis"><text:span text:style-name="T17"><text:s/>Простота сопровождения:</text:span></text:span><text:span text:style-name="T18"> Чистая структура папок (</text:span><text:span text:style-name="Source_20_Text"><text:span text:style-name="T20">/img</text:span></text:span><text:span text:style-name="T18">, </text:span><text:span text:style-name="Source_20_Text"><text:span text:style-name="T20">/css</text:span></text:span><text:span text:style-name="T18">, </text:span><text:span text:style-name="Source_20_Text"><text:span text:style-name="T20">/js</text:span></text:span><text:span text:style-name="T18">, </text:span><text:span text:style-name="Source_20_Text"><text:span text:style-name="T20">/audio</text:span></text:span><text:span text:style-name="T18">), понятные имена файлов, комментарии в ключевых местах кода.</text:span></text:p>
        </text:list-item>
      </text:list>
      <text:p text:style-name="P19"/>
      <text:p text:style-name="P23"><text:span text:style-name="Strong_20_Emphasis"><text:span text:style-name="T17">7. Технические условия</text:span></text:span></text:p>
      <text:p text:style-name="P23"><text:span text:style-name="Strong_20_Emphasis"><text:span text:style-name="T17"/></text:span></text:p>
      <text:list text:style-name="L8">
        <text:list-item>
          <text:p text:style-name="P24"><text:span text:style-name="Strong_20_Emphasis"><text:span text:style-name="T17"><text:s/>Языки разметки и стилей:</text:span></text:span><text:span text:style-name="T18"> HTML5, CSS3 (с использованием Flexbox/Grid для вёрстки).</text:span></text:p>
        </text:list-item>
        <text:list-item>
          <text:p text:style-name="P24"><text:soft-page-break/><text:span text:style-name="Strong_20_Emphasis"><text:span text:style-name="T17"><text:s/>Язык программирования:</text:span></text:span><text:span text:style-name="T18"> JavaScript (Vanilla JS) для реализации простого интерактива (меню-бургер, кнопка "Наверх").</text:span></text:p>
        </text:list-item>
        <text:list-item>
          <text:p text:style-name="P24"><text:span text:style-name="Strong_20_Emphasis"><text:span text:style-name="T17"><text:s/>Локальный запуск:</text:span></text:span><text:span text:style-name="T18"> Запуск через прямой открытие </text:span><text:span text:style-name="Source_20_Text"><text:span text:style-name="T20">index.html</text:span></text:span><text:span text:style-name="T18"> или через Live Server в VS Code.</text:span></text:p>
        </text:list-item>
        <text:list-item>
          <text:p text:style-name="P24"><text:span text:style-name="Strong_20_Emphasis"><text:span text:style-name="T17"><text:s/>Инструменты:</text:span></text:span><text:span text:style-name="T18"> Visual Studio Code, Git для контроля версий (опционально), графические редакторы для обработки изображений (Figma, Photopea).</text:span></text:p>
        </text:list-item>
        <text:list-item>
          <text:p text:style-name="P24"><text:span text:style-name="Strong_20_Emphasis"><text:span text:style-name="T17"><text:s/>Тестирование:</text:span></text:span><text:span text:style-name="T18"> Ручное тестирование в браузерах Chrome, Firefox и на эмуляторах мобильных устройств.</text:span></text:p>
        </text:list-item>
      </text:list>
      <text:p text:style-name="P9"><text:span text:style-name="T8"/></text:p>
      <text:p text:style-name="P25"><text:span text:style-name="Strong_20_Emphasis"><text:span text:style-name="T17">8. Источники информации</text:span></text:span></text:p>
      <text:p text:style-name="P25"><text:span text:style-name="Strong_20_Emphasis"><text:span text:style-name="T9">Государственный водный реестр (ГВР)</text:span></text:span><text:span text:style-name="Strong_20_Emphasis"><text:span text:style-name="T10"> — официальные данные о водных объектах РФ.</text:span></text:span></text:p>
      <text:list text:style-name="L9">
        <text:list-header>
          <text:p text:style-name="P26"><text:span text:style-name="Strong_20_Emphasis"><text:span text:style-name="T9">ГИС ЦП Вода</text:span></text:span><text:span text:style-name="T10"> — данные о состоянии и загрязнении водных объектов.</text:span></text:p>
          <text:p text:style-name="P26"><text:span text:style-name="Strong_20_Emphasis"><text:span text:style-name="T9">База NERM</text:span></text:span><text:span text:style-name="T10"> — пространственно‑временные данные о реках Северной Евразии (в т. ч. Волге, Оби, Енисее и др.).</text:span></text:p>
          <text:p text:style-name="P26"><text:span text:style-name="Strong_20_Emphasis"><text:span text:style-name="T9">Научные журналы</text:span></text:span><text:span text:style-name="T10"> («Водные ресурсы», «Известия РАН. Серия географическая») — исследования гидрологического режима и изменений стока.</text:span></text:p>
          <text:p text:style-name="P26"><text:span text:style-name="Strong_20_Emphasis"><text:span text:style-name="T9">Базы Гидрохимического института</text:span></text:span><text:span text:style-name="T10"> — данные о химическом составе и качестве воды.</text:span></text:p>
          <text:p text:style-name="P26"><text:span text:style-name="Strong_20_Emphasis"><text:span text:style-name="T9">Проект «Реки РГО»</text:span></text:span><text:span text:style-name="T10"> (Русского географического общества) — комплексные исследования рек, экология, туризм.</text:span></text:p>
          <text:p text:style-name="P26"><text:span text:style-name="Strong_20_Emphasis"><text:span text:style-name="T9">«Большая российская энциклопедия»</text:span></text:span><text:span text:style-name="T10"> — базовые сведения о реках (длина, бассейн, расход воды).</text:span></text:p>
          <text:p text:style-name="P26"><text:span text:style-name="Strong_20_Emphasis"><text:span text:style-name="T9">Геопортал «Реки России»</text:span></text:span><text:span text:style-name="T10"> — открытые данные и карты водных ресурсов.</text:span></text:p>
          <text:p text:style-name="P26"><text:span text:style-name="Strong_20_Emphasis"><text:span text:style-name="T9">СМИ и образовательные платформы</text:span></text:span><text:span text:style-name="T10"> — статьи и обзоры о значении рек для природы и экономики.</text:span></text:p>
          <text:p text:style-name="P26"><text:span text:style-name="Strong_20_Emphasis"><text:span text:style-name="T9">Отчёты экологических НКО</text:span></text:span><text:span text:style-name="T10"> — мониторинг состояния рек и природоохранные инициативы.</text:span></text:p>
        </text:list-header>
      </text:list>
      <text:p text:style-name="P25"><text:span text:style-name="Strong_20_Emphasis"><text:span text:style-name="T1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YS Geo" svg:font-family="'YS Geo', apple-system, BlinkMacSystemFont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Droid Sans" style:font-family-complex="'Droid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roid Sans1" style:font-family-complex="'Droid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2T09:36:38.213278413</dc:date>
    <meta:editing-duration>PT12M8S</meta:editing-duration>
    <meta:editing-cycles>2</meta:editing-cycles>
    <meta:generator>LibreOffice/24.8.3.2$Linux_X86_64 LibreOffice_project/48a6bac9e7e268aeb4c3483fcf825c94556d9f92</meta:generator>
    <meta:document-statistic meta:table-count="0" meta:image-count="0" meta:object-count="0" meta:page-count="4" meta:paragraph-count="69" meta:word-count="708" meta:character-count="5342" meta:non-whitespace-character-count="4716"/>
  </office:meta>
</office:document-meta>
</file>